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MUNE DE SOULLANS</text:p>
      <text:p text:style-name="Preformatted_20_Text">Arrêté municipal n°2025-001</text:p>
      <text:p text:style-name="Preformatted_20_Text"/>
      <text:p text:style-name="Preformatted_20_Text">OBJET : Restriction de circulation — Rue du Maréchal Foch — Travaux</text:p>
      <text:p text:style-name="Preformatted_20_Text"/>
      <text:p text:style-name="Preformatted_20_Text">Le Maire de Soullans,</text:p>
      <text:p text:style-name="Preformatted_20_Text">Vu le code de la route,</text:p>
      <text:p text:style-name="Preformatted_20_Text">Vu les travaux de voirie programmés du 15 au 30 mars 2025,</text:p>
      <text:p text:style-name="Preformatted_20_Text"/>
      <text:p text:style-name="Preformatted_20_Text">ARRÊTE</text:p>
      <text:p text:style-name="Preformatted_20_Text"/>
      <text:p text:style-name="Preformatted_20_Text">Article 1 : La circulation est interdite rue du Maréchal Foch du 15 au 30 mars 2025.</text:p>
      <text:p text:style-name="Preformatted_20_Text">Article 2 : Une déviation est mise en place via la rue de la Liberté.</text:p>
      <text:p text:style-name="Preformatted_20_Text"/>
      <text:p text:style-name="Preformatted_20_Text">Fait à Soullans, le 1er mars 2025.</text:p>
      <text:p text:style-name="Preformatted_20_Text">Le Maire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1" meta:word-count="80" meta:character-count="417" meta:non-whitespace-character-count="346"/>
    <meta:generator>LibreOffice/24.2.7.2$Linux_X86_64 LibreOffice_project/420$Build-2</meta:generator>
  </office:meta>
</office:document-meta>
</file>
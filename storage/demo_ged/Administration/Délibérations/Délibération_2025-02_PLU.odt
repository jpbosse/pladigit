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MMUNE DE SOULLANS</text:p>
      <text:p text:style-name="Preformatted_20_Text">Délibération n°2025-02 — Lancement de la révision du PLU</text:p>
      <text:p text:style-name="Preformatted_20_Text"/>
      <text:p text:style-name="Preformatted_20_Text">Séance du conseil municipal du 5 février 2025</text:p>
      <text:p text:style-name="Preformatted_20_Text"/>
      <text:p text:style-name="Preformatted_20_Text">Le conseil municipal, réuni en séance ordinaire,</text:p>
      <text:p text:style-name="Preformatted_20_Text">Vu le code de l'urbanisme,</text:p>
      <text:p text:style-name="Preformatted_20_Text"/>
      <text:p text:style-name="Preformatted_20_Text">DÉLIBÈRE</text:p>
      <text:p text:style-name="Preformatted_20_Text"/>
      <text:p text:style-name="Preformatted_20_Text">Article 1 : Le conseil municipal prescrit la révision du Plan Local d'Urbanisme.</text:p>
      <text:p text:style-name="Preformatted_20_Text">Article 2 : Les objectifs de la révision sont les suivants :</text:p>
      <text:p text:style-name="Preformatted_20_Text"><text:s text:c="2"/>- Intégrer les évolutions réglementaires (loi Climat et Résilience)</text:p>
      <text:p text:style-name="Preformatted_20_Text"><text:s text:c="2"/>- Identifier de nouveaux secteurs d'urbanisation</text:p>
      <text:p text:style-name="Preformatted_20_Text"><text:s text:c="2"/>- Renforcer la protection des zones agricoles et naturelles</text:p>
      <text:p text:style-name="Preformatted_20_Text"/>
      <text:p text:style-name="Preformatted_20_Text">Le Maire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2" meta:word-count="83" meta:character-count="531" meta:non-whitespace-character-count="453"/>
    <meta:generator>LibreOffice/24.2.7.2$Linux_X86_64 LibreOffice_project/420$Build-2</meta:generator>
  </office:meta>
</office:document-meta>
</file>
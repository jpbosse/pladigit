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OMMUNE DE SOULLANS</text:p>
      <text:p text:style-name="Preformatted_20_Text">Délibération n°2025-01 — Budget primitif 2025</text:p>
      <text:p text:style-name="Preformatted_20_Text"/>
      <text:p text:style-name="Preformatted_20_Text">Séance du conseil municipal du 15 janvier 2025</text:p>
      <text:p text:style-name="Preformatted_20_Text"/>
      <text:p text:style-name="Preformatted_20_Text">Le conseil municipal, réuni en séance ordinaire,</text:p>
      <text:p text:style-name="Preformatted_20_Text">Vu le code général des collectivités territoriales,</text:p>
      <text:p text:style-name="Preformatted_20_Text">Vu les instructions comptables M57,</text:p>
      <text:p text:style-name="Preformatted_20_Text"/>
      <text:p text:style-name="Preformatted_20_Text">DÉLIBÈRE</text:p>
      <text:p text:style-name="Preformatted_20_Text"/>
      <text:p text:style-name="Preformatted_20_Text">Article 1 : Le budget primitif 2025 est arrêté comme suit :</text:p>
      <text:p text:style-name="Preformatted_20_Text"><text:s text:c="2"/>- Section de fonctionnement : 1 250 000 €</text:p>
      <text:p text:style-name="Preformatted_20_Text"><text:s text:c="2"/>- Section d'investissement : <text:s text:c="3"/>430 000 €</text:p>
      <text:p text:style-name="Preformatted_20_Text"/>
      <text:p text:style-name="Preformatted_20_Text">Article 2 : La présente délibération sera transmise au représentant de l'État.</text:p>
      <text:p text:style-name="Preformatted_20_Text"/>
      <text:p text:style-name="Preformatted_20_Text">Le Maire,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12" meta:word-count="78" meta:character-count="484" meta:non-whitespace-character-count="410"/>
    <meta:generator>LibreOffice/24.2.7.2$Linux_X86_64 LibreOffice_project/420$Build-2</meta:generator>
  </office:meta>
</office:document-meta>
</file>
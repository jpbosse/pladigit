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ORGANIGRAMME DE LA COMMUNE DE SOULLANS — 2025</text:p>
      <text:p text:style-name="Preformatted_20_Text"/>
      <text:p text:style-name="Preformatted_20_Text">Direction Générale des Services</text:p>
      <text:p text:style-name="Preformatted_20_Text">└── Secrétariat Général</text:p>
      <text:p text:style-name="Preformatted_20_Text"/>
      <text:p text:style-name="Preformatted_20_Text">Direction des Services Techniques</text:p>
      <text:p text:style-name="Preformatted_20_Text">└── Service Voirie</text:p>
      <text:p text:style-name="Preformatted_20_Text"><text:s text:c="4"/>- Entretien de la voirie communale</text:p>
      <text:p text:style-name="Preformatted_20_Text"><text:s text:c="4"/>- Espaces verts</text:p>
      <text:p text:style-name="Preformatted_20_Text"/>
      <text:p text:style-name="Preformatted_20_Text">Direction des Ressources Humaines</text:p>
      <text:p text:style-name="Preformatted_20_Text">└── Service Paie</text:p>
      <text:p text:style-name="Preformatted_20_Text"><text:s text:c="4"/>- Gestion de la paie</text:p>
      <text:p text:style-name="Preformatted_20_Text"><text:s text:c="4"/>- Carrières et formation</text:p>
      <text:p text:style-name="Preformatted_20_Text"/>
      <text:p text:style-name="Preformatted_20_Text">Effectif total : 42 agents (35 titulaires, 7 contractuel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12" meta:word-count="55" meta:character-count="366" meta:non-whitespace-character-count="306"/>
    <meta:generator>LibreOffice/24.2.7.2$Linux_X86_64 LibreOffice_project/420$Build-2</meta:generator>
  </office:meta>
</office:document-meta>
</file>
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ÈGLEMENT INTÉRIEUR</text:p>
      <text:p text:style-name="Preformatted_20_Text">Commune de Soullans — Version 2025</text:p>
      <text:p text:style-name="Preformatted_20_Text"/>
      <text:p text:style-name="Preformatted_20_Text">TITRE I — DISPOSITIONS GÉNÉRALES</text:p>
      <text:p text:style-name="Preformatted_20_Text"/>
      <text:p text:style-name="Preformatted_20_Text">Article 1 — Objet</text:p>
      <text:p text:style-name="Preformatted_20_Text">Le présent règlement intérieur s'applique à l'ensemble des agents de la commune.</text:p>
      <text:p text:style-name="Preformatted_20_Text"/>
      <text:p text:style-name="Preformatted_20_Text">Article 2 — Horaires de travail</text:p>
      <text:p text:style-name="Preformatted_20_Text">La durée hebdomadaire de travail est fixée à 35 heures.</text:p>
      <text:p text:style-name="Preformatted_20_Text">Les horaires sont définis par service en accord avec le responsable hiérarchique.</text:p>
      <text:p text:style-name="Preformatted_20_Text"/>
      <text:p text:style-name="Preformatted_20_Text">TITRE II — DROITS ET OBLIGATIONS</text:p>
      <text:p text:style-name="Preformatted_20_Text"/>
      <text:p text:style-name="Preformatted_20_Text">Article 3 — Obligations de service</text:p>
      <text:p text:style-name="Preformatted_20_Text">Tout agent est tenu au respect du devoir de réserve, de neutralité et de discrétion.</text:p>
      <text:p text:style-name="Preformatted_20_Text"/>
      <text:p text:style-name="Preformatted_20_Text">Article 4 — Congés annuels</text:p>
      <text:p text:style-name="Preformatted_20_Text">Les congés sont accordés selon les dispositions statutaires en vigueur.</text:p>
      <text:p text:style-name="Preformatted_20_Text"/>
      <text:p text:style-name="Preformatted_20_Text">[Document complet disponible auprès du service RH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4" meta:word-count="99" meta:character-count="646" meta:non-whitespace-character-count="554"/>
    <meta:generator>LibreOffice/24.2.7.2$Linux_X86_64 LibreOffice_project/420$Build-2</meta:generator>
  </office:meta>
</office:document-meta>
</file>